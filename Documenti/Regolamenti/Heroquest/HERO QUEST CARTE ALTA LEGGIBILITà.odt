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Dyslexic" svg:font-family="OpenDyslexic"/>
    <style:font-face style:name="OpenDyslexic1" svg:font-family="OpenDyslexic" style:font-family-generic="modern" style:font-pitch="variable"/>
  </office:font-face-decls>
  <office:automatic-styles>
    <style:style style:name="Tabella1" style:family="table" style:master-page-name="">
      <style:table-properties style:width="19.001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6.301cm"/>
    </style:style>
    <style:style style:name="Tabella1.B" style:family="table-column">
      <style:table-column-properties style:column-width="6.302cm"/>
    </style:style>
    <style:style style:name="Tabella1.C" style:family="table-column">
      <style:table-column-properties style:column-width="6.398cm"/>
    </style:style>
    <style:style style:name="Tabella1.1" style:family="table-row">
      <style:table-row-properties style:min-row-height="8.8cm"/>
    </style:style>
    <style:style style:name="Tabella1.A1" style:family="table-cell">
      <style:table-cell-properties fo:padding="0.097cm" fo:border-left="1.5pt solid #000000" fo:border-right="none" fo:border-top="1.5pt solid #000000" fo:border-bottom="1.5pt solid #000000"/>
    </style:style>
    <style:style style:name="Tabella1.C1" style:family="table-cell">
      <style:table-cell-properties fo:padding="0.097cm" fo:border="1.5pt solid #000000"/>
    </style:style>
    <style:style style:name="Tabella1.A2" style:family="table-cell">
      <style:table-cell-properties fo:padding="0.097cm" fo:border-left="1.5pt solid #000000" fo:border-right="none" fo:border-top="none" fo:border-bottom="1.5pt solid #000000"/>
    </style:style>
    <style:style style:name="Tabella1.C2" style:family="table-cell">
      <style:table-cell-properties fo:padding="0.097cm" fo:border-left="1.5pt solid #000000" fo:border-right="1.5pt solid #000000" fo:border-top="none" fo:border-bottom="1.5pt solid #000000"/>
    </style:style>
    <style:style style:name="Tabella1.3" style:family="table-row">
      <style:table-row-properties style:min-row-height="8.8cm" fo:background-color="transparent" fo:keep-together="auto">
        <style:background-image/>
      </style:table-row-properties>
    </style:style>
    <style:style style:name="Tabella1.C3" style:family="table-cell">
      <style:table-cell-properties style:vertical-align="" fo:background-color="transparent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ella2" style:family="table" style:master-page-name="">
      <style:table-properties style:width="19.001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a2.A" style:family="table-column">
      <style:table-column-properties style:column-width="6.301cm"/>
    </style:style>
    <style:style style:name="Tabella2.B" style:family="table-column">
      <style:table-column-properties style:column-width="6.302cm"/>
    </style:style>
    <style:style style:name="Tabella2.C" style:family="table-column">
      <style:table-column-properties style:column-width="6.398cm"/>
    </style:style>
    <style:style style:name="Tabella2.1" style:family="table-row">
      <style:table-row-properties style:min-row-height="8.8cm"/>
    </style:style>
    <style:style style:name="Tabella2.A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C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1.5pt solid #000000" fo:border-right="none" fo:border-top="none" fo:border-bottom="1.5pt solid #000000"/>
    </style:style>
    <style:style style:name="Tabella2.C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8.8cm" fo:background-color="transparent" fo:keep-together="auto">
        <style:background-image/>
      </style:table-row-properties>
    </style:style>
    <style:style style:name="Tabella2.C3" style:family="table-cell">
      <style:table-cell-properties style:vertical-align="" fo:background-color="transparent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ella3" style:family="table" style:master-page-name="">
      <style:table-properties style:width="18.889cm" fo:margin-left="0.111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a3.A" style:family="table-column">
      <style:table-column-properties style:column-width="6.191cm"/>
    </style:style>
    <style:style style:name="Tabella3.B" style:family="table-column">
      <style:table-column-properties style:column-width="6.315cm"/>
    </style:style>
    <style:style style:name="Tabella3.C" style:family="table-column">
      <style:table-column-properties style:column-width="6.384cm"/>
    </style:style>
    <style:style style:name="Tabella3.1" style:family="table-row">
      <style:table-row-properties style:min-row-height="8.8cm"/>
    </style:style>
    <style:style style:name="Tabella3.A1" style:family="table-cell">
      <style:table-cell-properties fo:padding="0.097cm" fo:border-left="1.5pt solid #000000" fo:border-right="none" fo:border-top="1.5pt solid #000000" fo:border-bottom="1.5pt solid #000000"/>
    </style:style>
    <style:style style:name="Tabella3.C1" style:family="table-cell">
      <style:table-cell-properties fo:padding="0.097cm" fo:border="1.5pt solid #000000"/>
    </style:style>
    <style:style style:name="Tabella3.A2" style:family="table-cell">
      <style:table-cell-properties fo:padding="0.097cm" fo:border-left="1.5pt solid #000000" fo:border-right="none" fo:border-top="none" fo:border-bottom="1.5pt solid #000000"/>
    </style:style>
    <style:style style:name="Tabella3.C2" style:family="table-cell">
      <style:table-cell-properties fo:padding="0.097cm" fo:border-left="1.5pt solid #000000" fo:border-right="1.5pt solid #000000" fo:border-top="none" fo:border-bottom="1.5pt solid #000000"/>
    </style:style>
    <style:style style:name="Tabella3.3" style:family="table-row">
      <style:table-row-properties style:min-row-height="8.8cm" fo:background-color="transparent" fo:keep-together="auto">
        <style:background-image/>
      </style:table-row-properties>
    </style:style>
    <style:style style:name="Tabella3.C3" style:family="table-cell">
      <style:table-cell-properties style:vertical-align="" fo:background-color="transparent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ella4" style:family="table" style:master-page-name="">
      <style:table-properties style:width="19.001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a4.A" style:family="table-column">
      <style:table-column-properties style:column-width="6.301cm"/>
    </style:style>
    <style:style style:name="Tabella4.B" style:family="table-column">
      <style:table-column-properties style:column-width="6.302cm"/>
    </style:style>
    <style:style style:name="Tabella4.C" style:family="table-column">
      <style:table-column-properties style:column-width="6.398cm"/>
    </style:style>
    <style:style style:name="Tabella4.1" style:family="table-row">
      <style:table-row-properties style:min-row-height="8.8cm"/>
    </style:style>
    <style:style style:name="Tabella4.A1" style:family="table-cell">
      <style:table-cell-properties fo:padding="0.097cm" fo:border-left="1.5pt solid #000000" fo:border-right="none" fo:border-top="1.5pt solid #000000" fo:border-bottom="1.5pt solid #000000"/>
    </style:style>
    <style:style style:name="Tabella4.C1" style:family="table-cell">
      <style:table-cell-properties fo:padding="0.097cm" fo:border="1.5pt solid #000000"/>
    </style:style>
    <style:style style:name="Tabella4.A2" style:family="table-cell">
      <style:table-cell-properties fo:padding="0.097cm" fo:border-left="1.5pt solid #000000" fo:border-right="none" fo:border-top="none" fo:border-bottom="1.5pt solid #000000"/>
    </style:style>
    <style:style style:name="Tabella4.C2" style:family="table-cell">
      <style:table-cell-properties fo:padding="0.097cm" fo:border-left="1.5pt solid #000000" fo:border-right="1.5pt solid #000000" fo:border-top="none" fo:border-bottom="1.5pt solid #000000"/>
    </style:style>
    <style:style style:name="Tabella4.3" style:family="table-row">
      <style:table-row-properties style:min-row-height="8.8cm" fo:background-color="transparent" fo:keep-together="auto">
        <style:background-image/>
      </style:table-row-properties>
    </style:style>
    <style:style style:name="Tabella4.C3" style:family="table-cell">
      <style:table-cell-properties style:vertical-align="" fo:background-color="transparent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ella5" style:family="table" style:master-page-name="">
      <style:table-properties style:width="19.001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a5.A" style:family="table-column">
      <style:table-column-properties style:column-width="6.301cm"/>
    </style:style>
    <style:style style:name="Tabella5.B" style:family="table-column">
      <style:table-column-properties style:column-width="6.302cm"/>
    </style:style>
    <style:style style:name="Tabella5.C" style:family="table-column">
      <style:table-column-properties style:column-width="6.398cm"/>
    </style:style>
    <style:style style:name="Tabella5.1" style:family="table-row">
      <style:table-row-properties style:min-row-height="8.8cm"/>
    </style:style>
    <style:style style:name="Tabella5.A1" style:family="table-cell">
      <style:table-cell-properties fo:padding="0.097cm" fo:border-left="1.5pt solid #000000" fo:border-right="none" fo:border-top="1.5pt solid #000000" fo:border-bottom="1.5pt solid #000000"/>
    </style:style>
    <style:style style:name="Tabella5.C1" style:family="table-cell">
      <style:table-cell-properties fo:padding="0.097cm" fo:border="1.5pt solid #000000"/>
    </style:style>
    <style:style style:name="Tabella5.A2" style:family="table-cell">
      <style:table-cell-properties fo:padding="0.097cm" fo:border-left="1.5pt solid #000000" fo:border-right="none" fo:border-top="none" fo:border-bottom="1.5pt solid #000000"/>
    </style:style>
    <style:style style:name="Tabella5.C2" style:family="table-cell">
      <style:table-cell-properties fo:padding="0.097cm" fo:border-left="1.5pt solid #000000" fo:border-right="1.5pt solid #000000" fo:border-top="none" fo:border-bottom="1.5pt solid #000000"/>
    </style:style>
    <style:style style:name="Tabella5.3" style:family="table-row">
      <style:table-row-properties style:min-row-height="8.8cm" fo:background-color="transparent" fo:keep-together="auto">
        <style:background-image/>
      </style:table-row-properties>
    </style:style>
    <style:style style:name="Tabella5.C3" style:family="table-cell">
      <style:table-cell-properties style:vertical-align="" fo:background-color="transparent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ella6" style:family="table" style:master-page-name="">
      <style:table-properties style:width="19.001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a6.A" style:family="table-column">
      <style:table-column-properties style:column-width="6.301cm"/>
    </style:style>
    <style:style style:name="Tabella6.B" style:family="table-column">
      <style:table-column-properties style:column-width="6.302cm"/>
    </style:style>
    <style:style style:name="Tabella6.C" style:family="table-column">
      <style:table-column-properties style:column-width="6.398cm"/>
    </style:style>
    <style:style style:name="Tabella6.1" style:family="table-row">
      <style:table-row-properties style:min-row-height="8.8cm"/>
    </style:style>
    <style:style style:name="Tabella6.A1" style:family="table-cell">
      <style:table-cell-properties fo:padding="0.097cm" fo:border-left="1.5pt solid #000000" fo:border-right="none" fo:border-top="1.5pt solid #000000" fo:border-bottom="1.5pt solid #000000"/>
    </style:style>
    <style:style style:name="Tabella6.C1" style:family="table-cell">
      <style:table-cell-properties fo:padding="0.097cm" fo:border="1.5pt solid #000000"/>
    </style:style>
    <style:style style:name="Tabella6.A2" style:family="table-cell">
      <style:table-cell-properties fo:padding="0.097cm" fo:border-left="1.5pt solid #000000" fo:border-right="none" fo:border-top="none" fo:border-bottom="1.5pt solid #000000"/>
    </style:style>
    <style:style style:name="Tabella6.C2" style:family="table-cell">
      <style:table-cell-properties fo:padding="0.097cm" fo:border-left="1.5pt solid #000000" fo:border-right="1.5pt solid #000000" fo:border-top="none" fo:border-bottom="1.5pt solid #000000"/>
    </style:style>
    <style:style style:name="Tabella6.3" style:family="table-row">
      <style:table-row-properties style:min-row-height="8.8cm" fo:background-color="transparent" fo:keep-together="auto">
        <style:background-image/>
      </style:table-row-properties>
    </style:style>
    <style:style style:name="Tabella6.C3" style:family="table-cell">
      <style:table-cell-properties style:vertical-align="" fo:background-color="transparent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ella7" style:family="table" style:master-page-name="">
      <style:table-properties style:width="19.001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a7.A" style:family="table-column">
      <style:table-column-properties style:column-width="6.301cm"/>
    </style:style>
    <style:style style:name="Tabella7.B" style:family="table-column">
      <style:table-column-properties style:column-width="6.302cm"/>
    </style:style>
    <style:style style:name="Tabella7.C" style:family="table-column">
      <style:table-column-properties style:column-width="6.398cm"/>
    </style:style>
    <style:style style:name="Tabella7.1" style:family="table-row">
      <style:table-row-properties style:min-row-height="8.8cm"/>
    </style:style>
    <style:style style:name="Tabella7.A1" style:family="table-cell">
      <style:table-cell-properties fo:padding="0.097cm" fo:border-left="1.5pt solid #000000" fo:border-right="none" fo:border-top="1.5pt solid #000000" fo:border-bottom="1.5pt solid #000000"/>
    </style:style>
    <style:style style:name="Tabella7.C1" style:family="table-cell">
      <style:table-cell-properties fo:padding="0.097cm" fo:border="1.5pt solid #000000"/>
    </style:style>
    <style:style style:name="Tabella7.A2" style:family="table-cell">
      <style:table-cell-properties fo:padding="0.097cm" fo:border-left="1.5pt solid #000000" fo:border-right="none" fo:border-top="none" fo:border-bottom="1.5pt solid #000000"/>
    </style:style>
    <style:style style:name="Tabella7.C2" style:family="table-cell">
      <style:table-cell-properties fo:padding="0.097cm" fo:border-left="1.5pt solid #000000" fo:border-right="1.5pt solid #000000" fo:border-top="none" fo:border-bottom="1.5pt solid #000000"/>
    </style:style>
    <style:style style:name="Tabella7.3" style:family="table-row">
      <style:table-row-properties style:min-row-height="8.8cm" fo:background-color="transparent" fo:keep-together="auto">
        <style:background-image/>
      </style:table-row-properties>
    </style:style>
    <style:style style:name="Tabella7.C3" style:family="table-cell">
      <style:table-cell-properties style:vertical-align="" fo:background-color="transparent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ella8" style:family="table" style:master-page-name="">
      <style:table-properties style:width="19.001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a8.A" style:family="table-column">
      <style:table-column-properties style:column-width="6.301cm"/>
    </style:style>
    <style:style style:name="Tabella8.B" style:family="table-column">
      <style:table-column-properties style:column-width="6.302cm"/>
    </style:style>
    <style:style style:name="Tabella8.C" style:family="table-column">
      <style:table-column-properties style:column-width="6.398cm"/>
    </style:style>
    <style:style style:name="Tabella8.1" style:family="table-row">
      <style:table-row-properties style:min-row-height="8.8cm"/>
    </style:style>
    <style:style style:name="Tabella8.A1" style:family="table-cell">
      <style:table-cell-properties fo:padding="0.097cm" fo:border-left="1.5pt solid #000000" fo:border-right="none" fo:border-top="1.5pt solid #000000" fo:border-bottom="1.5pt solid #000000"/>
    </style:style>
    <style:style style:name="Tabella8.C1" style:family="table-cell">
      <style:table-cell-properties fo:padding="0.097cm" fo:border="1.5pt solid #000000"/>
    </style:style>
    <style:style style:name="Tabella8.A2" style:family="table-cell">
      <style:table-cell-properties fo:padding="0.097cm" fo:border-left="1.5pt solid #000000" fo:border-right="none" fo:border-top="none" fo:border-bottom="1.5pt solid #000000"/>
    </style:style>
    <style:style style:name="Tabella8.C2" style:family="table-cell">
      <style:table-cell-properties fo:padding="0.097cm" fo:border-left="1.5pt solid #000000" fo:border-right="1.5pt solid #000000" fo:border-top="none" fo:border-bottom="1.5pt solid #000000"/>
    </style:style>
    <style:style style:name="Tabella8.3" style:family="table-row">
      <style:table-row-properties style:min-row-height="8.8cm" fo:background-color="transparent" fo:keep-together="auto">
        <style:background-image/>
      </style:table-row-properties>
    </style:style>
    <style:style style:name="Tabella8.C3" style:family="table-cell">
      <style:table-cell-properties style:vertical-align="" fo:background-color="transparent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ella9" style:family="table" style:master-page-name="">
      <style:table-properties style:width="19.001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a9.A" style:family="table-column">
      <style:table-column-properties style:column-width="6.301cm"/>
    </style:style>
    <style:style style:name="Tabella9.B" style:family="table-column">
      <style:table-column-properties style:column-width="6.302cm"/>
    </style:style>
    <style:style style:name="Tabella9.C" style:family="table-column">
      <style:table-column-properties style:column-width="6.398cm"/>
    </style:style>
    <style:style style:name="Tabella9.1" style:family="table-row">
      <style:table-row-properties style:min-row-height="8.8cm"/>
    </style:style>
    <style:style style:name="Tabella9.A1" style:family="table-cell">
      <style:table-cell-properties fo:padding="0.097cm" fo:border-left="1.5pt solid #000000" fo:border-right="none" fo:border-top="1.5pt solid #000000" fo:border-bottom="1.5pt solid #000000"/>
    </style:style>
    <style:style style:name="Tabella9.C1" style:family="table-cell">
      <style:table-cell-properties fo:padding="0.097cm" fo:border="1.5pt solid #000000"/>
    </style:style>
    <style:style style:name="Tabella9.A2" style:family="table-cell">
      <style:table-cell-properties fo:padding="0.097cm" fo:border-left="1.5pt solid #000000" fo:border-right="none" fo:border-top="none" fo:border-bottom="1.5pt solid #000000"/>
    </style:style>
    <style:style style:name="Tabella9.C2" style:family="table-cell">
      <style:table-cell-properties fo:padding="0.097cm" fo:border-left="1.5pt solid #000000" fo:border-right="1.5pt solid #000000" fo:border-top="none" fo:border-bottom="1.5pt solid #000000"/>
    </style:style>
    <style:style style:name="Tabella9.3" style:family="table-row">
      <style:table-row-properties style:min-row-height="8.8cm" fo:background-color="transparent" fo:keep-together="auto">
        <style:background-image/>
      </style:table-row-properties>
    </style:style>
    <style:style style:name="Tabella9.C3" style:family="table-cell">
      <style:table-cell-properties style:vertical-align="" fo:background-color="transparent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ella10" style:family="table" style:master-page-name="">
      <style:table-properties style:width="19.001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a10.A" style:family="table-column">
      <style:table-column-properties style:column-width="6.301cm"/>
    </style:style>
    <style:style style:name="Tabella10.B" style:family="table-column">
      <style:table-column-properties style:column-width="6.302cm"/>
    </style:style>
    <style:style style:name="Tabella10.C" style:family="table-column">
      <style:table-column-properties style:column-width="6.398cm"/>
    </style:style>
    <style:style style:name="Tabella10.1" style:family="table-row">
      <style:table-row-properties style:min-row-height="8.8cm"/>
    </style:style>
    <style:style style:name="Tabella10.A1" style:family="table-cell">
      <style:table-cell-properties fo:padding="0.097cm" fo:border-left="1.5pt solid #000000" fo:border-right="none" fo:border-top="1.5pt solid #000000" fo:border-bottom="1.5pt solid #000000"/>
    </style:style>
    <style:style style:name="Tabella10.C1" style:family="table-cell">
      <style:table-cell-properties fo:padding="0.097cm" fo:border="1.5pt solid #000000"/>
    </style:style>
    <style:style style:name="Tabella10.A2" style:family="table-cell">
      <style:table-cell-properties fo:padding="0.097cm" fo:border-left="1.5pt solid #000000" fo:border-right="none" fo:border-top="none" fo:border-bottom="1.5pt solid #000000"/>
    </style:style>
    <style:style style:name="Tabella10.C2" style:family="table-cell">
      <style:table-cell-properties fo:padding="0.097cm" fo:border-left="1.5pt solid #000000" fo:border-right="1.5pt solid #000000" fo:border-top="none" fo:border-bottom="1.5pt solid #000000"/>
    </style:style>
    <style:style style:name="Tabella10.3" style:family="table-row">
      <style:table-row-properties style:min-row-height="8.8cm" fo:background-color="transparent" fo:keep-together="auto">
        <style:background-image/>
      </style:table-row-properties>
    </style:style>
    <style:style style:name="Tabella10.C3" style:family="table-cell">
      <style:table-cell-properties style:vertical-align="" fo:background-color="transparent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OpenDyslexic1" fo:font-size="13pt" fo:font-weight="bold" officeooo:rsid="0009f335" officeooo:paragraph-rsid="0009f335" style:font-size-asian="13pt" style:font-weight-asian="bold" style:font-size-complex="13pt" style:font-weight-complex="bold"/>
    </style:style>
    <style:style style:name="P2" style:family="paragraph" style:parent-style-name="Table_20_Contents">
      <style:text-properties style:font-name="OpenDyslexic1" fo:font-size="13pt" fo:font-weight="normal" officeooo:rsid="0009f335" officeooo:paragraph-rsid="0009f335" style:font-size-asian="13pt" style:font-weight-asian="normal" style:font-size-complex="13pt" style:font-weight-complex="normal"/>
    </style:style>
    <style:style style:name="P3" style:family="paragraph" style:parent-style-name="Table_20_Contents">
      <style:text-properties style:font-name="OpenDyslexic1" fo:font-size="14pt" fo:font-weight="normal" officeooo:rsid="0009f335" officeooo:paragraph-rsid="0009f335" style:font-size-asian="12.25pt" style:font-weight-asian="normal" style:font-size-complex="14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OpenDyslexic1" fo:font-size="13pt" fo:font-weight="normal" officeooo:rsid="0009f335" officeooo:paragraph-rsid="0009f335" style:font-size-asian="13pt" style:font-weight-asian="normal" style:font-size-complex="13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OpenDyslexic1" fo:font-size="13pt" fo:font-weight="normal" officeooo:rsid="0009f335" officeooo:paragraph-rsid="000c0411" style:font-size-asian="13pt" style:font-weight-asian="normal" style:font-size-complex="13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OpenDyslexic1" fo:font-size="13pt" fo:font-weight="bold" officeooo:rsid="000c0411" officeooo:paragraph-rsid="000c0411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OpenDyslexic1" fo:font-size="13pt" fo:font-weight="bold" officeooo:rsid="000b3576" officeooo:paragraph-rsid="000b3576" style:font-size-asian="13pt" style:font-weight-asian="bold" style:font-size-complex="13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OpenDyslexic1" fo:font-size="13pt" fo:font-weight="bold" officeooo:rsid="000a62f0" officeooo:paragraph-rsid="000a62f0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OpenDyslexic1" fo:font-size="13pt" fo:font-weight="normal" officeooo:rsid="000a62f0" officeooo:paragraph-rsid="000a62f0" style:font-size-asian="13pt" style:font-weight-asian="normal" style:font-size-complex="13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OpenDyslexic1" fo:font-size="13pt" fo:font-weight="bold" officeooo:rsid="000b3576" officeooo:paragraph-rsid="000b3576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OpenDyslexic1" fo:font-size="13pt" fo:font-weight="normal" officeooo:rsid="000b3576" officeooo:paragraph-rsid="000b3576" style:font-size-asian="13pt" style:font-weight-asian="normal" style:font-size-complex="1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OpenDyslexic1" fo:font-size="13pt" fo:font-weight="normal" officeooo:rsid="000b3576" officeooo:paragraph-rsid="000b3576" style:font-size-asian="13pt" style:font-weight-asian="normal" style:font-size-complex="13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OpenDyslexic" fo:font-size="13pt" fo:font-weight="normal" officeooo:rsid="000b3576" officeooo:paragraph-rsid="000b3576" style:font-size-asian="13pt" style:font-weight-asian="normal" style:font-size-complex="13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OpenDyslexic" fo:font-size="13pt" fo:font-weight="bold" officeooo:rsid="000b3576" officeooo:paragraph-rsid="000b3576" style:font-size-asian="13pt" style:font-weight-asian="bold" style:font-size-complex="13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OpenDyslexic1" fo:font-size="13pt" fo:font-weight="bold" officeooo:rsid="000c0411" officeooo:paragraph-rsid="000c0411" style:font-size-asian="13pt" style:font-weight-asian="bold" style:font-size-complex="13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OpenDyslexic" fo:font-size="13pt" fo:font-weight="normal" officeooo:rsid="000c0411" officeooo:paragraph-rsid="000c0411" style:font-size-asian="13pt" style:font-weight-asian="normal" style:font-size-complex="13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OpenDyslexic" fo:font-size="13pt" fo:font-weight="bold" officeooo:rsid="000c0411" officeooo:paragraph-rsid="000c0411" style:font-size-asian="13pt" style:font-weight-asian="bold" style:font-size-complex="13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OpenDyslexic1" fo:font-size="13pt" fo:font-weight="bold" officeooo:rsid="000ca1f8" officeooo:paragraph-rsid="000ca1f8" style:font-size-asian="13pt" style:font-weight-asian="bold" style:font-size-complex="13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OpenDyslexic1" fo:font-size="13pt" fo:font-weight="normal" officeooo:rsid="000ca1f8" officeooo:paragraph-rsid="000ca1f8" style:font-size-asian="13pt" style:font-weight-asian="normal" style:font-size-complex="13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OpenDyslexic1" fo:font-size="13pt" fo:font-weight="normal" officeooo:rsid="000d2280" officeooo:paragraph-rsid="000d2280" style:font-size-asian="13pt" style:font-weight-asian="normal" style:font-size-complex="13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OpenDyslexic1" fo:font-size="13pt" fo:font-weight="bold" officeooo:rsid="000d2280" officeooo:paragraph-rsid="000d2280" style:font-size-asian="13pt" style:font-weight-asian="bold" style:font-size-complex="13pt" style:font-weight-complex="bold"/>
    </style:style>
    <style:style style:name="P22" style:family="paragraph" style:parent-style-name="Standard">
      <style:text-properties officeooo:paragraph-rsid="0009f335"/>
    </style:style>
    <style:style style:name="P23" style:family="paragraph" style:parent-style-name="Table_20_Contents">
      <style:paragraph-properties fo:text-align="center" style:justify-single-word="false"/>
      <style:text-properties style:font-name="OpenDyslexic1" fo:font-size="13pt" fo:font-weight="bold" officeooo:rsid="000eaf22" officeooo:paragraph-rsid="000eaf22" style:font-size-asian="13pt" style:font-weight-asian="bold" style:font-size-complex="13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OpenDyslexic1" fo:font-size="13pt" fo:font-weight="normal" officeooo:rsid="000eaf22" officeooo:paragraph-rsid="000eaf22" style:font-size-asian="13pt" style:font-weight-asian="normal" style:font-size-complex="13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OpenDyslexic1" fo:font-size="13pt" fo:font-weight="bold" officeooo:rsid="000fde97" officeooo:paragraph-rsid="000fde97" style:font-size-asian="13pt" style:font-weight-asian="bold" style:font-size-complex="13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OpenDyslexic1" fo:font-size="13pt" fo:font-weight="normal" officeooo:rsid="000fde97" officeooo:paragraph-rsid="000fde97" style:font-size-asian="13pt" style:font-weight-asian="normal" style:font-size-complex="13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OpenDyslexic1" fo:font-size="13pt" fo:font-weight="normal" officeooo:rsid="000fde97" officeooo:paragraph-rsid="00148b0f" style:font-size-asian="13pt" style:font-weight-asian="normal" style:font-size-complex="13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OpenDyslexic1" fo:font-size="13pt" fo:font-weight="normal" officeooo:rsid="001034e2" officeooo:paragraph-rsid="001034e2" style:font-size-asian="13pt" style:font-weight-asian="normal" style:font-size-complex="13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OpenDyslexic1" fo:font-size="13pt" fo:font-weight="bold" officeooo:rsid="001034e2" officeooo:paragraph-rsid="001034e2" style:font-size-asian="13pt" style:font-weight-asian="bold" style:font-size-complex="13pt" style:font-weight-complex="bold"/>
    </style:style>
    <style:style style:name="P30" style:family="paragraph" style:parent-style-name="Standard">
      <style:text-properties officeooo:paragraph-rsid="000b3576"/>
    </style:style>
    <style:style style:name="P31" style:family="paragraph" style:parent-style-name="Table_20_Contents">
      <style:paragraph-properties fo:text-align="center" style:justify-single-word="false"/>
      <style:text-properties style:font-name="OpenDyslexic1" fo:font-size="13pt" fo:font-weight="bold" officeooo:rsid="0010bccf" officeooo:paragraph-rsid="0010bccf" style:font-size-asian="13pt" style:font-weight-asian="bold" style:font-size-complex="13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OpenDyslexic1" fo:font-size="13pt" fo:font-weight="normal" officeooo:rsid="0010bccf" officeooo:paragraph-rsid="0010bccf" style:font-size-asian="13pt" style:font-weight-asian="normal" style:font-size-complex="13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OpenDyslexic1" fo:font-size="13pt" fo:font-weight="normal" officeooo:rsid="00129dfd" officeooo:paragraph-rsid="00129dfd" style:font-size-asian="13pt" style:font-weight-asian="normal" style:font-size-complex="13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OpenDyslexic1" fo:font-size="13pt" fo:font-weight="bold" officeooo:rsid="00129dfd" officeooo:paragraph-rsid="00129dfd" style:font-size-asian="13pt" style:font-weight-asian="bold" style:font-size-complex="13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OpenDyslexic1" fo:font-size="13pt" fo:font-weight="bold" officeooo:rsid="001034e2" officeooo:paragraph-rsid="00148b0f" style:font-size-asian="13pt" style:font-weight-asian="bold" style:font-size-complex="13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OpenDyslexic1" fo:font-size="13pt" fo:font-weight="normal" officeooo:rsid="001034e2" officeooo:paragraph-rsid="00148b0f" style:font-size-asian="13pt" style:font-weight-asian="normal" style:font-size-complex="13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OpenDyslexic1" fo:font-size="13pt" fo:font-weight="bold" officeooo:rsid="00148b0f" officeooo:paragraph-rsid="00148b0f" style:font-size-asian="13pt" style:font-weight-asian="bold" style:font-size-complex="13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OpenDyslexic1" fo:font-size="13pt" fo:font-weight="normal" officeooo:rsid="00148b0f" officeooo:paragraph-rsid="00148b0f" style:font-size-asian="13pt" style:font-weight-asian="normal" style:font-size-complex="13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OpenDyslexic1" fo:font-size="13pt" fo:font-weight="normal" officeooo:rsid="00148b0f" officeooo:paragraph-rsid="00148b0f" style:font-size-asian="13pt" style:font-weight-asian="normal" style:font-size-complex="13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OpenDyslexic1" fo:font-size="13pt" fo:font-weight="bold" officeooo:rsid="000fde97" officeooo:paragraph-rsid="00148b0f" style:font-size-asian="13pt" style:font-weight-asian="bold" style:font-size-complex="13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OpenDyslexic1" fo:font-size="13pt" fo:font-weight="bold" officeooo:rsid="000fde97" officeooo:paragraph-rsid="00163b75" style:font-size-asian="13pt" style:font-weight-asian="bold" style:font-size-complex="13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OpenDyslexic1" fo:font-size="13pt" fo:font-weight="normal" officeooo:rsid="000fde97" officeooo:paragraph-rsid="00163b75" style:font-size-asian="13pt" style:font-weight-asian="normal" style:font-size-complex="13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OpenDyslexic1" fo:font-size="13pt" fo:font-weight="bold" officeooo:rsid="00163b75" officeooo:paragraph-rsid="00163b75" style:font-size-asian="13pt" style:font-weight-asian="bold" style:font-size-complex="13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OpenDyslexic1" fo:font-size="13pt" fo:font-weight="bold" officeooo:rsid="00163b75" officeooo:paragraph-rsid="00163b75" style:font-size-asian="13pt" style:font-weight-asian="bold" style:font-size-complex="13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OpenDyslexic1" fo:font-size="13pt" fo:font-weight="bold" officeooo:rsid="001034e2" officeooo:paragraph-rsid="00163b75" style:font-size-asian="13pt" style:font-weight-asian="bold" style:font-size-complex="13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OpenDyslexic1" fo:font-size="13pt" fo:font-weight="normal" officeooo:rsid="001034e2" officeooo:paragraph-rsid="00163b75" style:font-size-asian="13pt" style:font-weight-asian="normal" style:font-size-complex="13pt" style:font-weight-complex="normal"/>
    </style:style>
    <style:style style:name="P47" style:family="paragraph" style:parent-style-name="Standard">
      <style:text-properties officeooo:paragraph-rsid="000fde97"/>
    </style:style>
    <style:style style:name="P48" style:family="paragraph" style:parent-style-name="Table_20_Contents">
      <style:paragraph-properties fo:text-align="center" style:justify-single-word="false"/>
      <style:text-properties style:font-name="OpenDyslexic1" fo:font-size="13pt" fo:font-weight="bold" officeooo:rsid="001034e2" officeooo:paragraph-rsid="00173b19" style:font-size-asian="13pt" style:font-weight-asian="bold" style:font-size-complex="13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OpenDyslexic1" fo:font-size="13pt" fo:font-weight="normal" officeooo:rsid="001034e2" officeooo:paragraph-rsid="00173b19" style:font-size-asian="13pt" style:font-weight-asian="normal" style:font-size-complex="13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OpenDyslexic1" fo:font-size="13pt" fo:font-weight="bold" officeooo:rsid="00173b19" officeooo:paragraph-rsid="00173b19" style:font-size-asian="13pt" style:font-weight-asian="bold" style:font-size-complex="13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OpenDyslexic" fo:font-size="13pt" fo:font-weight="normal" officeooo:rsid="00181e04" officeooo:paragraph-rsid="00181e04" style:font-size-asian="13pt" style:font-weight-asian="normal" style:font-size-complex="13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OpenDyslexic1" fo:font-size="13pt" fo:font-weight="bold" officeooo:rsid="00173b19" officeooo:paragraph-rsid="00173b19" style:font-size-asian="13pt" style:font-weight-asian="bold" style:font-size-complex="13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OpenDyslexic1" fo:font-size="13pt" fo:font-weight="bold" officeooo:rsid="00181e04" officeooo:paragraph-rsid="00181e04" style:font-size-asian="13pt" style:font-weight-asian="bold" style:font-size-complex="13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OpenDyslexic1" fo:font-size="13pt" fo:font-weight="normal" officeooo:rsid="00181e04" officeooo:paragraph-rsid="00181e04" style:font-size-asian="13pt" style:font-weight-asian="normal" style:font-size-complex="13pt" style:font-weight-complex="normal"/>
    </style:style>
    <style:style style:name="P55" style:family="paragraph" style:parent-style-name="Table_20_Contents">
      <style:text-properties officeooo:paragraph-rsid="000fde97"/>
    </style:style>
    <style:style style:name="T1" style:family="text">
      <style:text-properties officeooo:rsid="000a62f0"/>
    </style:style>
    <style:style style:name="T2" style:family="text">
      <style:text-properties style:font-name="OpenDyslexic" officeooo:rsid="000a62f0"/>
    </style:style>
    <style:style style:name="T3" style:family="text">
      <style:text-properties style:font-name="OpenDyslexic" officeooo:rsid="000b3576"/>
    </style:style>
    <style:style style:name="T4" style:family="text">
      <style:text-properties style:font-name="OpenDyslexic" officeooo:rsid="000c0411"/>
    </style:style>
    <style:style style:name="T5" style:family="text">
      <style:text-properties officeooo:rsid="000c041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OpenDyslexic" fo:font-weight="normal" style:font-weight-asian="normal" style:font-weight-complex="normal"/>
    </style:style>
    <style:style style:name="T8" style:family="text">
      <style:text-properties style:font-name="OpenDyslex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OpenDyslexic" fo:font-weight="normal" officeooo:rsid="000b3576" style:font-weight-asian="normal" style:font-weight-complex="normal"/>
    </style:style>
    <style:style style:name="T11" style:family="text">
      <style:text-properties style:font-name="OpenDyslexic1"/>
    </style:style>
    <style:style style:name="T12" style:family="text">
      <style:text-properties officeooo:rsid="001034e2"/>
    </style:style>
    <style:style style:name="T13" style:family="text">
      <style:text-properties officeooo:rsid="00148b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"><text:span text:style-name="T1">BACCHETTA</text:span> <text:span text:style-name="T1">DEL</text:span> <text:span text:style-name="T1">RICHIAMO</text:span></text:p>
            <text:p text:style-name="P2">LA BACCHETTA PERMETTE DI LANCIARE 2 INCANTESIMI IN 1 TURNO INVECE CHE SOLO 1.</text:p>
            <text:p text:style-name="P3"/>
          </table:table-cell>
          <table:table-cell table:style-name="Tabella1.A1" office:value-type="string">
            <text:p text:style-name="P1"><text:span text:style-name="T1">CORAZZA</text:span> <text:span text:style-name="T1">DI</text:span> B<text:span text:style-name="T1">ORIN</text:span></text:p>
            <text:p text:style-name="P4">P<text:span text:style-name="T1">ERMETTE</text:span> <text:span text:style-name="T1">DI TIRARE</text:span> 4 <text:span text:style-name="T1">DADI</text:span> <text:span text:style-name="T1">COMBATTIMENTO</text:span> <text:span text:style-name="T1">IN DIFESA.</text:span></text:p>
            <text:p text:style-name="P4"/>
            <text:p text:style-name="P1">CORAZZA</text:p>
          </table:table-cell>
          <table:table-cell table:style-name="Tabella1.C1" office:value-type="string">
            <text:p text:style-name="P1"><text:span text:style-name="T1">TALISMANO</text:span> <text:span text:style-name="T1">DI</text:span> <text:span text:style-name="T1">LORE</text:span></text:p>
            <text:p text:style-name="P4">A<text:span text:style-name="T1">UMENTA DI</text:span> 2 <text:span text:style-name="T1">PUNTI</text:span> <text:span text:style-name="T1">MENTE IL PERSONAGGIO</text:span> <text:span text:style-name="T1">FINCH</text:span><text:span text:style-name="T2">É</text:span> <text:span text:style-name="T1">LO</text:span> <text:span text:style-name="T1">SI POSSIEDE</text:span>. </text:p>
          </table:table-cell>
        </table:table-row>
        <table:table-row table:style-name="Tabella1.1">
          <table:table-cell table:style-name="Tabella1.A2" office:value-type="string">
            <text:p text:style-name="P1"><text:span text:style-name="T1">MORTE</text:span> <text:span text:style-name="T1">DEGLI</text:span> <text:span text:style-name="T1">ORCHI</text:span></text:p>
            <text:p text:style-name="P5">V<text:span text:style-name="T1">I</text:span> <text:span text:style-name="T1">PERMETTE</text:span> <text:span text:style-name="T1">DI</text:span> <text:span text:style-name="T1">TIRARE</text:span> 2 <text:span text:style-name="T1">DADI</text:span> <text:span text:style-name="T1">IN </text:span><text:span text:style-name="T3">PIÙ </text:span><text:span text:style-name="T4">PER </text:span><text:span text:style-name="T1">ATTACC</text:span><text:span text:style-name="T5">ARE</text:span>. S<text:span text:style-name="T1">E</text:span> <text:span text:style-name="T1">CONTRO</text:span> O<text:span text:style-name="T1">RCHI</text:span>, <text:span text:style-name="T1">ATTACCA</text:span> 2 <text:span text:style-name="T1">VOLTE.</text:span></text:p>
            <text:p text:style-name="P6">ARMA</text:p>
          </table:table-cell>
          <table:table-cell table:style-name="Tabella1.A2" office:value-type="string">
            <text:p text:style-name="P1">LAMA DEGLI SPIRITI</text:p>
            <text:p text:style-name="P4">PERMETTE DI TIRARE 3 DADI IN ATTACCO OPPURE 4 DADI PER ATTACCARE NON MORTI.</text:p>
            <text:p text:style-name="P7">ARMA</text:p>
          </table:table-cell>
          <table:table-cell table:style-name="Tabella1.C2" office:value-type="string">
            <text:p text:style-name="P8">SONNO</text:p>
            <text:p text:style-name="P9">ADDORMENTA MOSTRO/PERSONAGGIO SE NON OTTIENE SCUDO. SI SVEGLIA SE ATTACCATI O SI OTTIENE 6 CON DADO.</text:p>
          </table:table-cell>
        </table:table-row>
        <table:table-row table:style-name="Tabella1.3">
          <table:table-cell table:style-name="Tabella1.A2" office:value-type="string">
            <text:p text:style-name="P8">ACQUA GUARITRICE</text:p>
            <text:p text:style-name="P9">RIPRISTINA FINO A 4 PUNTI CORPO PERDUTI DI UN PERSONAGGIO. SCARTA DOPO USO.</text:p>
          </table:table-cell>
          <table:table-cell table:style-name="Tabella1.A2" office:value-type="string">
            <text:p text:style-name="P7">VELO DI NEBBIA</text:p>
            <text:p text:style-name="P10"><text:span text:style-name="T6">PU</text:span><text:span text:style-name="T7">Ò</text:span><text:span text:style-name="T6"> SPOSTARSI ATTRAVERSO CASELLE OCCUPATE DA MOSTRI O PERSONAGGI. SCARTA DOPO USO</text:span></text:p>
          </table:table-cell>
          <table:table-cell table:style-name="Tabella1.C3" office:value-type="string">
            <text:p text:style-name="P7">ASCIA</text:p>
            <text:p text:style-name="P11">LANCIA 2 DADI DA COMBATTIMENTO IN ATTACCO.</text:p>
            <text:p text:style-name="P11">COSTO 150 MONETE</text:p>
            <text:p text:style-name="P11">IL MAGO NON PU<text:span text:style-name="T8">Ò</text:span> USARLA.</text:p>
            <text:p text:style-name="P12"><text:s/><text:span text:style-name="T9">ARMA</text:span></text:p>
          </table:table-cell>
        </table:table-row>
      </table:table>
      <text:p text:style-name="Standard"/>
      <text:p text:style-name="Standard"/>
      <text:p text:style-name="Standard"><text:soft-page-break/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7">BRACCIALI</text:p>
            <text:p text:style-name="P11">PERMETTONO 1 DADO IN <text:span text:style-name="T8">PIÙ</text:span> IN DIFESA.</text:p>
            <text:p text:style-name="P11">COSTO: 200 MONETE, UTILIZZABILI SOLO DAL MAGO.</text:p>
            <text:p text:style-name="P7">CORAZZA</text:p>
          </table:table-cell>
          <table:table-cell table:style-name="Tabella2.A1" office:value-type="string">
            <text:p text:style-name="P7">SCUDO</text:p>
            <text:p text:style-name="P11">PERMETTONO 1 DADO IN <text:span text:style-name="T8">PIÙ IN DIFESA.</text:span></text:p>
            <text:p text:style-name="P13">COSTO: 100 MONETE. MAGO NON PUÒ USARLO.</text:p>
            <text:p text:style-name="P14">CORAZZA</text:p>
          </table:table-cell>
          <table:table-cell table:style-name="Tabella2.C1" office:value-type="string">
            <text:p text:style-name="P6">MANTELLO PROTETTIVO</text:p>
            <text:p text:style-name="P15"><text:span text:style-name="T6">UTILIZZA 1 DADO IN </text:span><text:span text:style-name="T10">PIÙ </text:span><text:span text:style-name="T7">IN DIFESA.</text:span></text:p>
            <text:p text:style-name="P16">COSTO:350 MONETE</text:p>
            <text:p text:style-name="P17"><text:s/>CORAZZA<text:span text:style-name="T11"> </text:span></text:p>
          </table:table-cell>
        </table:table-row>
        <table:table-row table:style-name="Tabella2.1">
          <table:table-cell table:style-name="Tabella2.A2" office:value-type="string">
            <text:p text:style-name="P18">BALESTRA</text:p>
            <text:p text:style-name="P19">UTILIZZA 3 DADI IN ATTACCO. NON USABILE SU MOSTRO SU CASELLE ADIACENTI. 350 MONETE. NON USABILE DA M.</text:p>
          </table:table-cell>
          <table:table-cell table:style-name="Tabella2.A2" office:value-type="string">
            <text:p text:style-name="P18">MAGLIA DI FERRO</text:p>
            <text:p text:style-name="P19">UTILIZZA 3 DADI IN DIFESA.</text:p>
            <text:p text:style-name="P19">COSTO:450 MONETE. NON USABILE DA MAGO.</text:p>
            <text:p text:style-name="P18">CORAZZA</text:p>
          </table:table-cell>
          <table:table-cell table:style-name="Tabella2.C2" office:value-type="string">
            <text:p text:style-name="P18">BORSA DEGLI ATTREZZI</text:p>
            <text:p text:style-name="P19">RIMUOVE TRAPPOLE. SE ESCE TESCHIO, TRAPPOLA RIMOSSA MA -1 PUNTO CORPO. COSTO: 250 MONETE</text:p>
          </table:table-cell>
        </table:table-row>
        <table:table-row table:style-name="Tabella2.3">
          <table:table-cell table:style-name="Tabella2.A2" office:value-type="string">
            <text:p text:style-name="P18">LANCIA</text:p>
            <text:p text:style-name="P19">PERMETTE 2 DADI IN ATTACCO E ATTACCA IN DIAGONALE. COSTO:150 MONETE, NON USABILE DA MAGO.</text:p>
          </table:table-cell>
          <table:table-cell table:style-name="Tabella2.A2" office:value-type="string">
            <text:p text:style-name="P18">ASCIA DA BATTAGLIA</text:p>
            <text:p text:style-name="P20">4 DADI IN ATTACCO, MA NON PERMETTE USO DI SCUDO.</text:p>
            <text:p text:style-name="P20">COSTO:400 MONETE. NON USABILE DA MAGO </text:p>
          </table:table-cell>
          <table:table-cell table:style-name="Tabella2.C3" office:value-type="string">
            <text:p text:style-name="P21">BASTONE</text:p>
            <text:p text:style-name="P20">PERMETTE DI TIRARE 2 DADI ATTACCO E ESSERE USATO IN DIAGONALE.</text:p>
            <text:p text:style-name="P20">COSTO:100 MONETE.</text:p>
            <text:p text:style-name="P21">ARMA</text:p>
          </table:table-cell>
        </table:table-row>
      </table:table>
      <text:p text:style-name="P22"/>
      <table:table table:name="Tabella3" table:style-name="Tabella3">
        <table:table-column table:style-name="Tabella3.A"/>
        <table:table-column table:style-name="Tabella3.B"/>
        <table:table-column table:style-name="Tabella3.C"/>
        <text:soft-page-break/>
        <table:table-row table:style-name="Tabella3.1">
          <table:table-cell table:style-name="Tabella3.A1" office:value-type="string">
            <text:p text:style-name="P23">ARMATURA CORAZZATA</text:p>
            <text:p text:style-name="P24">TIRA 4 DADI IN DIFESA, MA SOLO 1 PER MOVIMENTO. COSTO:850 MONETE. NON USABILE DA MAGO.</text:p>
          </table:table-cell>
          <table:table-cell table:style-name="Tabella3.A1" office:value-type="string">
            <text:p text:style-name="P23">ELMO</text:p>
            <text:p text:style-name="P24">UTILIZZA <text:span text:style-name="T8">+</text:span>1 DADO IN DIFESA. COSTO: 120 MONETE. NON USABILE DA MAGO</text:p>
            <text:p text:style-name="P23">CORAZZA</text:p>
          </table:table-cell>
          <table:table-cell table:style-name="Tabella3.C1" office:value-type="string">
            <text:p text:style-name="P23">SPADONE</text:p>
            <text:p text:style-name="P24">PERMETTE 3 DADI IN ATTACCO. COSTO: 250 MONETE. NON USABILE DA MAGO</text:p>
            <text:p text:style-name="P23">ARMA</text:p>
          </table:table-cell>
        </table:table-row>
        <table:table-row table:style-name="Tabella3.1">
          <table:table-cell table:style-name="Tabella3.A2" office:value-type="string">
            <text:p text:style-name="P23">SPADINO</text:p>
            <text:p text:style-name="P24">PERMETTE 2 DADI IN ATTACCO. COSTO:150 MONETE. NON USABILE DA MAGO.</text:p>
            <text:p text:style-name="P23">ARMA</text:p>
          </table:table-cell>
          <table:table-cell table:style-name="Tabella3.A2" office:value-type="string">
            <text:p text:style-name="P25">UN BEL GRUZZOLO!</text:p>
            <text:p text:style-name="P26">SCOPRITE UNO SCRIGNO CON 100 MONETE D’ORO. DOPO AVERLE SEGNATE, RIMETTERE NEL MAZZO <text:span text:style-name="T12">TES.</text:span></text:p>
          </table:table-cell>
          <table:table-cell table:style-name="Tabella3.C2" office:value-type="string">
            <text:p text:style-name="P25">POZIONE DEL RECUPERO</text:p>
            <text:p text:style-name="P26">USABILE IN QUALUNQUE MOMENTO PER 2 DADI IN Più NEL PROSSIMO COMBATTIMENTO. SCARTA DOPO USO.</text:p>
          </table:table-cell>
        </table:table-row>
        <table:table-row table:style-name="Tabella3.3">
          <table:table-cell table:style-name="Tabella3.A2" office:value-type="string">
            <text:p text:style-name="P25">MOSTRO ERRANTE</text:p>
            <text:p text:style-name="P27">UN MOSTRO VI ATTACCA <text:span text:style-name="T12">SUBITO</text:span> DA UNA CASELLA ADIACENTE LA VOSTRA. <text:span text:style-name="T13">RIMETTERE NEL MAZZO.</text:span> <text:s/><text:span text:style-name="T13"><text:s/></text:span></text:p>
          </table:table-cell>
          <table:table-cell table:style-name="Tabella3.A2" office:value-type="string">
            <text:p text:style-name="P25">TRAPPOLA!</text:p>
            <text:p text:style-name="P28">PERDETE UN PUNTO CORPO CAUSA FRECCIA NEL MURO. RIMETTERE NEL MAZZO TES.</text:p>
          </table:table-cell>
          <table:table-cell table:style-name="Tabella3.C3" office:value-type="string">
            <text:p text:style-name="P29">POZIONE RISANANTE</text:p>
            <text:p text:style-name="P28">USABILE IN QUALUNQUE MOMENTO, RISANA FINO A 4 PUNTI CORPO. SCARTA DOPO USO.</text:p>
          </table:table-cell>
        </table:table-row>
      </table:table>
      <text:p text:style-name="P30"/>
      <text:p text:style-name="Standard"/>
      <text:p text:style-name="Standard"><text:soft-page-break/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29">ORO!</text:p>
            <text:p text:style-name="P28">BOTTINO DI SOLE 10 MONETE D’ORO. REGISTRARE SUL FOGLIO SEGNA PUNTI.</text:p>
          </table:table-cell>
          <table:table-cell table:style-name="Tabella4.A1" office:value-type="string">
            <text:p text:style-name="P29">ATTRAVERSA ROCCIA</text:p>
            <text:p text:style-name="P28">INCANTESIMO CHE PERMETTE DI VARCARE I MURI QUANTO UN MOVIMENTO LO CONSENTE. SCARTA DOPO.</text:p>
          </table:table-cell>
          <table:table-cell table:style-name="Tabella4.C1" office:value-type="string">
            <text:p text:style-name="P29">GUARIGIONE DEL CORPO</text:p>
            <text:p text:style-name="P28">RIPRISTINA FINO A 4 PUNTI CORPO PERDUTI. SCARTA DOPO USO.</text:p>
          </table:table-cell>
        </table:table-row>
        <table:table-row table:style-name="Tabella4.1">
          <table:table-cell table:style-name="Tabella4.A2" office:value-type="string">
            <text:p text:style-name="P31">PELLE DI PIETRA </text:p>
            <text:p text:style-name="P32"><text:span text:style-name="T8">+2</text:span> DADI IN DIFESA, FINCH<text:span text:style-name="T8">É</text:span> IL PERSONAGGIO SU CUI <text:span text:style-name="T8">É</text:span> LANCIATO NON VIENE FERITO. SCARTA DOPO USO.</text:p>
          </table:table-cell>
          <table:table-cell table:style-name="Tabella4.A2" office:value-type="string">
            <text:p text:style-name="P31">VENTO IMPETUOSO</text:p>
            <text:p text:style-name="P32">TIRA IL DOPPIO DEI DADI RISPETTO IL NORMALE MOVIMENTO. SCARTA DOPO USO.</text:p>
          </table:table-cell>
          <table:table-cell table:style-name="Tabella4.C2" office:value-type="string">
            <text:p text:style-name="P31">GENIO</text:p>
            <text:p text:style-name="P32">EVOCA GENIO CHE APRE PORTA E RIVELA <text:s/>CONTENUTO STANZA O ATTACCA CON 5 DADI UNA CREATURA. SCARTA DOPO.</text:p>
          </table:table-cell>
        </table:table-row>
        <table:table-row table:style-name="Tabella4.3">
          <table:table-cell table:style-name="Tabella4.A2" office:value-type="string">
            <text:p text:style-name="P31">TEMPESTA</text:p>
            <text:p text:style-name="P32">POTETE FAR SALTARE IL TURNO A UN MOSTRO O A UN PERSONAGGIO. SCARTA DOPO USO.</text:p>
          </table:table-cell>
          <table:table-cell table:style-name="Tabella4.A2" office:value-type="string">
            <text:p text:style-name="P31">FIAMMA D’IRA</text:p>
            <text:p text:style-name="P32">TROVA UN MOSTRO O UN PERSONAGGIO OVUNQUE E INFLIGGE UN PUNTO FERITA SE NON TIRA SCUDO. SCARTA DOPO USO.</text:p>
          </table:table-cell>
          <table:table-cell table:style-name="Tabella4.C3" office:value-type="string">
            <text:p text:style-name="P31">PALLA DI FUOCO</text:p>
            <text:p text:style-name="P33">INFLIGGE UN DANNO 2 PUNTI CORPO. VITTIMA TIRA DUE DADI. SE ESCE SCUDO RIDUCE IL DANNO. SCARTA DOPO.</text:p>
          </table:table-cell>
        </table:table-row>
      </table:table>
      <text:p text:style-name="P30"/>
      <table:table table:name="Tabella5" table:style-name="Tabella5">
        <table:table-column table:style-name="Tabella5.A"/>
        <table:table-column table:style-name="Tabella5.B"/>
        <table:table-column table:style-name="Tabella5.C"/>
        <text:soft-page-break/>
        <table:table-row table:style-name="Tabella5.1">
          <table:table-cell table:style-name="Tabella5.A1" office:value-type="string">
            <text:p text:style-name="P34">CORAGGIO</text:p>
            <text:p text:style-name="P33">PERSONAGGIO TIRA DUE DADI IN PI<text:span text:style-name="T8">Ù</text:span> AD OGNI ATTACCO. TERMINA QUANDO NON CI SONO MOSTRI IN VISTA. SCARTA DOPO.</text:p>
          </table:table-cell>
          <table:table-cell table:style-name="Tabella5.A1" office:value-type="string">
            <text:p text:style-name="P34">GARGOYLE</text:p>
            <text:p text:style-name="P33">MOVIMENTO: 6 CASELLE</text:p>
            <text:p text:style-name="P33">ATTACCO: 4 DADI</text:p>
            <text:p text:style-name="P33">DIFESA: 6 DADI</text:p>
            <text:p text:style-name="P33">CORPO: 1</text:p>
            <text:p text:style-name="P33">MENTE: 4</text:p>
            <text:p text:style-name="P34"/>
          </table:table-cell>
          <table:table-cell table:style-name="Tabella5.C1" office:value-type="string">
            <text:p text:style-name="P34">ZOMBI</text:p>
            <text:p text:style-name="P33">MOVIMENTO: 4 CASELLE</text:p>
            <text:p text:style-name="P33">ATTACCO: 2 DADI</text:p>
            <text:p text:style-name="P33">DIFESA: 3 DADI</text:p>
            <text:p text:style-name="P33">CORPO: 1</text:p>
            <text:p text:style-name="P33">MENTE: 0</text:p>
          </table:table-cell>
        </table:table-row>
        <table:table-row table:style-name="Tabella5.1">
          <table:table-cell table:style-name="Tabella5.A2" office:value-type="string">
            <text:p text:style-name="P34">SCHELETRO</text:p>
            <text:p text:style-name="P33">MOVIMENTO: 6 CASELLE</text:p>
            <text:p text:style-name="P33">ATTACCO: 2 DADI</text:p>
            <text:p text:style-name="P33">DIFESA: 2 DADI</text:p>
            <text:p text:style-name="P33">CORPO: 1</text:p>
            <text:p text:style-name="P33">MENTE: 0</text:p>
          </table:table-cell>
          <table:table-cell table:style-name="Tabella5.A2" office:value-type="string">
            <text:p text:style-name="P34">FIMIR</text:p>
            <text:p text:style-name="P33">MOVIMENTO: 6 CASELLE</text:p>
            <text:p text:style-name="P33">ATTACCO: 3 DADI</text:p>
            <text:p text:style-name="P33">DIFESA: 3 DADI</text:p>
            <text:p text:style-name="P33">CORPO: 1</text:p>
            <text:p text:style-name="P33">MENTE: 3</text:p>
            <text:p text:style-name="P34"/>
          </table:table-cell>
          <table:table-cell table:style-name="Tabella5.C2" office:value-type="string">
            <text:p text:style-name="P34">GUERRIERO DEL CAOS</text:p>
            <text:p text:style-name="P33">MOVIMENTO: 6 CASELLE</text:p>
            <text:p text:style-name="P33">ATTACCO: 3 DADI</text:p>
            <text:p text:style-name="P33">DIFESA: 4 DADI</text:p>
            <text:p text:style-name="P33">CORPO: 1</text:p>
            <text:p text:style-name="P33">MENTE: 3</text:p>
          </table:table-cell>
        </table:table-row>
        <table:table-row table:style-name="Tabella5.3">
          <table:table-cell table:style-name="Tabella5.A2" office:value-type="string">
            <text:p text:style-name="P34">ORCO</text:p>
            <text:p text:style-name="P33">MOVIMENTO: 8 CASELLE</text:p>
            <text:p text:style-name="P33">ATTACCO: 3 DADI</text:p>
            <text:p text:style-name="P33">DIFESA: 2 DADI</text:p>
            <text:p text:style-name="P33">CORPO: 1</text:p>
            <text:p text:style-name="P33">MENTE: 2</text:p>
          </table:table-cell>
          <table:table-cell table:style-name="Tabella5.A2" office:value-type="string">
            <text:p text:style-name="P34">MUMMIA</text:p>
            <text:p text:style-name="P33">MOVIMENTO: 4 CASELLE</text:p>
            <text:p text:style-name="P33">ATTACCO: 3 DADI</text:p>
            <text:p text:style-name="P33">DIFESA: 4 DADI</text:p>
            <text:p text:style-name="P33">CORPO: 1</text:p>
            <text:p text:style-name="P33">MENTE: 0</text:p>
          </table:table-cell>
          <table:table-cell table:style-name="Tabella5.C3" office:value-type="string">
            <text:p text:style-name="P34">GOBLIN</text:p>
            <text:p text:style-name="P33">MOVIMENTO: 10 CASELLE</text:p>
            <text:p text:style-name="P33">ATTACCO: 2 DADI</text:p>
            <text:p text:style-name="P33">DIFESA: 1 DADI</text:p>
            <text:p text:style-name="P33">CORPO: 1</text:p>
            <text:p text:style-name="P33">MENTE: 1</text:p>
          </table:table-cell>
        </table:table-row>
      </table:table>
      <text:p text:style-name="P30"/>
      <text:p text:style-name="P30"/>
      <text:p text:style-name="P30"><text:soft-page-break/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p text:style-name="P35">ORO!</text:p>
            <text:p text:style-name="P36">BOTTINO DI SOLE 10 MONETE D’ORO. REGISTRARE SUL FOGLIO SEGNA PUNTI.</text:p>
          </table:table-cell>
          <table:table-cell table:style-name="Tabella6.A1" office:value-type="string">
            <text:p text:style-name="P37">GEMMA!</text:p>
            <text:p text:style-name="P38">BOTTINO DI 50 MONETE D’ORO. REGISTRARE SUL FOGLIO SEGNA PUNTI.</text:p>
            <text:p text:style-name="P39"/>
          </table:table-cell>
          <table:table-cell table:style-name="Tabella6.C1" office:value-type="string">
            <text:p text:style-name="P40">MOSTRO ERRANTE</text:p>
            <text:p text:style-name="P27">UN MOSTRO VI ATTACCA <text:span text:style-name="T12">SUBITO</text:span> DA UNA CASELLA ADIACENTE LA VOSTRA. <text:span text:style-name="T13">RIMETTERE NEL MAZZO.</text:span></text:p>
          </table:table-cell>
        </table:table-row>
        <table:table-row table:style-name="Tabella6.1">
          <table:table-cell table:style-name="Tabella6.A2" office:value-type="string">
            <text:p text:style-name="P40">MOSTRO ERRANTE</text:p>
            <text:p text:style-name="P27">UN MOSTRO VI ATTACCA <text:span text:style-name="T12">SUBITO</text:span> DA UNA CASELLA ADIACENTE LA VOSTRA.</text:p>
            <text:p text:style-name="P27"><text:span text:style-name="T13">RIMETTERE NEL MAZZO.</text:span></text:p>
          </table:table-cell>
          <table:table-cell table:style-name="Tabella6.A2" office:value-type="string">
            <text:p text:style-name="P40">TRAPPOLA!</text:p>
            <text:p text:style-name="P36">PERDETE UN PUNTO CORPO CAUSA FRECCIA NEL MURO. RIMETTERE NEL MAZZO TES.</text:p>
          </table:table-cell>
          <table:table-cell table:style-name="Tabella6.C2" office:value-type="string">
            <text:p text:style-name="P41">MOSTRO ERRANTE</text:p>
            <text:p text:style-name="P42">UN MOSTRO VI ATTACCA <text:span text:style-name="T12">SUBITO</text:span> DA UNA CASELLA ADIACENTE LA VOSTRA.</text:p>
            <text:p text:style-name="P42"><text:span text:style-name="T13">RIMETTERE NEL MAZZO.</text:span></text:p>
          </table:table-cell>
        </table:table-row>
        <table:table-row table:style-name="Tabella6.3">
          <table:table-cell table:style-name="Tabella6.A2" office:value-type="string">
            <text:p text:style-name="P41">MOSTRO ERRANTE</text:p>
            <text:p text:style-name="P42">UN MOSTRO VI ATTACCA <text:span text:style-name="T12">SUBITO</text:span> DA UNA CASELLA ADIACENTE LA VOSTRA.</text:p>
            <text:p text:style-name="P42"><text:span text:style-name="T13">RIMETTERE NEL MAZZO.</text:span></text:p>
          </table:table-cell>
          <table:table-cell table:style-name="Tabella6.A2" office:value-type="string">
            <text:p text:style-name="P43">NIENTE</text:p>
            <text:p text:style-name="P44"><text:span text:style-name="T6">NONOSTANTE ABBIATE CERCATO OVUNQUE, NON AVETE TROVATO NIENTE!</text:span> </text:p>
          </table:table-cell>
          <table:table-cell table:style-name="Tabella6.C3" office:value-type="string">
            <text:p text:style-name="P45">ORO!</text:p>
            <text:p text:style-name="P46">BOTTINO DI SOLE 10 MONETE D’ORO. REGISTRARE SUL FOGLIO SEGNA PUNTI.</text:p>
          </table:table-cell>
        </table:table-row>
      </table:table>
      <text:p text:style-name="P47"/>
      <text:p text:style-name="P30"><text:soft-page-break/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45">ORO!</text:p>
            <text:p text:style-name="P46">BOTTINO DI SOLE 10 MONETE D’ORO. REGISTRARE SUL FOGLIO SEGNA PUNTI.</text:p>
          </table:table-cell>
          <table:table-cell table:style-name="Tabella7.A1" office:value-type="string">
            <text:p text:style-name="P45">ORO!</text:p>
            <text:p text:style-name="P46">BOTTINO DI SOLE 10 MONETE D’ORO. REGISTRARE SUL FOGLIO SEGNA PUNTI.</text:p>
          </table:table-cell>
          <table:table-cell table:style-name="Tabella7.C1" office:value-type="string">
            <text:p text:style-name="P45">ORO!</text:p>
            <text:p text:style-name="P46">BOTTINO DI SOLE 10 MONETE D’ORO. REGISTRARE SUL FOGLIO SEGNA PUNTI.</text:p>
          </table:table-cell>
        </table:table-row>
        <table:table-row table:style-name="Tabella7.1">
          <table:table-cell table:style-name="Tabella7.A2" office:value-type="string">
            <text:p text:style-name="P48">POZIONE RISANANTE</text:p>
            <text:p text:style-name="P49">USABILE IN QUALUNQUE MOMENTO, RISANA FINO A 4 PUNTI CORPO. SCARTA DOPO USO.</text:p>
          </table:table-cell>
          <table:table-cell table:style-name="Tabella7.A2" office:value-type="string">
            <text:p text:style-name="P50">POZIONE DELLA RAPIDIT<text:span text:style-name="T8">À</text:span></text:p>
            <text:p text:style-name="P51">USABILE IN QUALUNQUE MOMENTO. TIRA IL DOPPIO DEI DADI PER UN TURNO. SCARTA DOPO USO</text:p>
            <text:p text:style-name="P52"><text:span text:style-name="T11"/></text:p>
          </table:table-cell>
          <table:table-cell table:style-name="Tabella7.C2" office:value-type="string">
            <text:p text:style-name="P53">POZIONE RINFORZANTE</text:p>
            <text:p text:style-name="P51">USABILE IN QUALUNQUE MOMENTO. +2 DADI IN ATTACCO PER PROSSIMA AZIONE. SCARTA DOPO USO.</text:p>
          </table:table-cell>
        </table:table-row>
        <table:table-row table:style-name="Tabella7.3">
          <table:table-cell table:style-name="Tabella7.A2" office:value-type="string">
            <text:p text:style-name="P53">INFUSO EROICO</text:p>
            <text:p text:style-name="P54">USABILE PRIMA DI ATTACCARE. PERMETTE 2 ATTACCHI INVECE CHE 1. SCARTA DOPO USO.</text:p>
          </table:table-cell>
          <table:table-cell table:style-name="Tabella7.A2" office:value-type="string">
            <text:p text:style-name="P53">ACQUA BENEDETTA</text:p>
            <text:p text:style-name="P54">ELIMINA UN QUALSIASI MOSTRO NON MORTO AL POSTO DELL’ATTACCO. SCARTA DOPO USO.</text:p>
          </table:table-cell>
          <table:table-cell table:style-name="Tabella7.C3" office:value-type="string">
            <text:p text:style-name="P53">GIOIELLI!</text:p>
            <text:p text:style-name="P54">GIOIELLI CHE VALGONO 50 MONETE D’ORO. RIPORTARE CIFRA SUL SEGNA PUNTI.</text:p>
          </table:table-cell>
        </table:table-row>
      </table:table>
      <text:p text:style-name="P47"/>
      <text:p text:style-name="P30"><text:soft-page-break/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ella8.1">
          <table:table-cell table:style-name="Tabella8.A1" office:value-type="string">
            <text:p text:style-name="P53">TRABOCCHETTO</text:p>
            <text:p text:style-name="P54">CASCATE E PERDETE UN PUNTO CORPO, MA AL PROSSIMO TURNO POTETE GIOCARE NORMALMENTE. RIMETTI MAZZO.</text:p>
          </table:table-cell>
          <table:table-cell table:style-name="Tabella8.A1" office:value-type="string">
            <text:p text:style-name="P53"/>
          </table:table-cell>
          <table:table-cell table:style-name="Tabella8.C1" office:value-type="string">
            <text:p text:style-name="P53"/>
          </table:table-cell>
        </table:table-row>
        <table:table-row table:style-name="Tabella8.1">
          <table:table-cell table:style-name="Tabella8.A2" office:value-type="string">
            <text:p text:style-name="P53"/>
          </table:table-cell>
          <table:table-cell table:style-name="Tabella8.A2" office:value-type="string">
            <text:p text:style-name="P53"/>
          </table:table-cell>
          <table:table-cell table:style-name="Tabella8.C2" office:value-type="string">
            <text:p text:style-name="P53"/>
          </table:table-cell>
        </table:table-row>
        <table:table-row table:style-name="Tabella8.3">
          <table:table-cell table:style-name="Tabella8.A2" office:value-type="string">
            <text:p text:style-name="P53"/>
          </table:table-cell>
          <table:table-cell table:style-name="Tabella8.A2" office:value-type="string">
            <text:p text:style-name="P53"/>
          </table:table-cell>
          <table:table-cell table:style-name="Tabella8.C3" office:value-type="string">
            <text:p text:style-name="P53"/>
          </table:table-cell>
        </table:table-row>
      </table:table>
      <text:p text:style-name="P47"/>
      <table:table table:name="Tabella9" table:style-name="Tabella9">
        <table:table-column table:style-name="Tabella9.A"/>
        <table:table-column table:style-name="Tabella9.B"/>
        <table:table-column table:style-name="Tabella9.C"/>
        <text:soft-page-break/>
        <table:table-row table:style-name="Tabella9.1">
          <table:table-cell table:style-name="Tabella9.A1" office:value-type="string">
            <text:p text:style-name="P55"/>
          </table:table-cell>
          <table:table-cell table:style-name="Tabella9.A1" office:value-type="string">
            <text:p text:style-name="P55"/>
          </table:table-cell>
          <table:table-cell table:style-name="Tabella9.C1" office:value-type="string">
            <text:p text:style-name="P55"/>
          </table:table-cell>
        </table:table-row>
        <table:table-row table:style-name="Tabella9.1">
          <table:table-cell table:style-name="Tabella9.A2" office:value-type="string">
            <text:p text:style-name="P55"/>
          </table:table-cell>
          <table:table-cell table:style-name="Tabella9.A2" office:value-type="string">
            <text:p text:style-name="P55"/>
          </table:table-cell>
          <table:table-cell table:style-name="Tabella9.C2" office:value-type="string">
            <text:p text:style-name="P55"/>
          </table:table-cell>
        </table:table-row>
        <table:table-row table:style-name="Tabella9.3">
          <table:table-cell table:style-name="Tabella9.A2" office:value-type="string">
            <text:p text:style-name="P55"/>
          </table:table-cell>
          <table:table-cell table:style-name="Tabella9.A2" office:value-type="string">
            <text:p text:style-name="P55"/>
          </table:table-cell>
          <table:table-cell table:style-name="Tabella9.C3" office:value-type="string">
            <text:p text:style-name="P55"/>
          </table:table-cell>
        </table:table-row>
      </table:table>
      <text:p text:style-name="P47"/>
      <text:p text:style-name="P30"/>
      <table:table table:name="Tabella10" table:style-name="Tabella10">
        <table:table-column table:style-name="Tabella10.A"/>
        <table:table-column table:style-name="Tabella10.B"/>
        <table:table-column table:style-name="Tabella10.C"/>
        <text:soft-page-break/>
        <table:table-row table:style-name="Tabella10.1">
          <table:table-cell table:style-name="Tabella10.A1" office:value-type="string">
            <text:p text:style-name="P55"/>
          </table:table-cell>
          <table:table-cell table:style-name="Tabella10.A1" office:value-type="string">
            <text:p text:style-name="P55"/>
          </table:table-cell>
          <table:table-cell table:style-name="Tabella10.C1" office:value-type="string">
            <text:p text:style-name="P55"/>
          </table:table-cell>
        </table:table-row>
        <table:table-row table:style-name="Tabella10.1">
          <table:table-cell table:style-name="Tabella10.A2" office:value-type="string">
            <text:p text:style-name="P55"/>
          </table:table-cell>
          <table:table-cell table:style-name="Tabella10.A2" office:value-type="string">
            <text:p text:style-name="P55"/>
          </table:table-cell>
          <table:table-cell table:style-name="Tabella10.C2" office:value-type="string">
            <text:p text:style-name="P55"/>
          </table:table-cell>
        </table:table-row>
        <table:table-row table:style-name="Tabella10.3">
          <table:table-cell table:style-name="Tabella10.A2" office:value-type="string">
            <text:p text:style-name="P55"/>
          </table:table-cell>
          <table:table-cell table:style-name="Tabella10.A2" office:value-type="string">
            <text:p text:style-name="P55"/>
          </table:table-cell>
          <table:table-cell table:style-name="Tabella10.C3" office:value-type="string">
            <text:p text:style-name="P55"/>
          </table:table-cell>
        </table:table-row>
      </table:table>
      <text:p text:style-name="P47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Dyslexic" svg:font-family="OpenDyslexic"/>
    <style:font-face style:name="OpenDyslexic1" svg:font-family="OpenDyslexic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85cm" style:type="center"/>
          <style:tab-stop style:position="19.7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451cm" style:type="center"/>
          <style:tab-stop style:position="20.9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.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3T15:42:20.080969800</meta:creation-date>
    <dc:date>2025-06-13T17:43:48.756531200</dc:date>
    <meta:editing-duration>PT1H15M33S</meta:editing-duration>
    <meta:editing-cycles>17</meta:editing-cycles>
    <meta:generator>LibreOffice/25.2.4.3$Windows_X86_64 LibreOffice_project/33e196637044ead23f5c3226cde09b47731f7e27</meta:generator>
    <meta:document-statistic meta:table-count="10" meta:image-count="0" meta:object-count="0" meta:page-count="12" meta:paragraph-count="183" meta:word-count="977" meta:character-count="5706" meta:non-whitespace-character-count="4901"/>
  </office:meta>
</office:document-meta>
</file>